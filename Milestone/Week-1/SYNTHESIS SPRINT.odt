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 SECTION A<text:s/></text:span><text:span text:style-name="T2">— PROBLEM STATEMENT ===</text:span></text:p>
      <text:p text:style-name="P1"><text:span text:style-name="T2"><text:s/></text:span></text:p>
      <text:p text:style-name="P1"><text:span text:style-name="T2">A1. Write 80-120 words describing the 5-stage pipeline:</text:span></text:p>
      <text:p text:style-name="P1"><text:span text:style-name="T2"><text:s text:c="4"/>Ingest -&gt; Structure -&gt; Store -&gt; Summarise -&gt; Visualise.</text:span></text:p>
      <text:p text:style-name="P1"><text:span text:style-name="T2"><text:s text:c="4"/>Describe in your own words what each stage does and how the</text:span></text:p>
      <text:p text:style-name="P1"><text:span text:style-name="T2"><text:s text:c="4"/>output of one stage flows into the next.</text:span></text:p>
      <text:p text:style-name="P1"><text:span text:style-name="T3">Ingest: The pipeline begins with ingest, where the PDF document is loaded and its content is extracted and sent to next stage.</text:span></text:p>
      <text:p text:style-name="P1"><text:span text:style-name="T3">Structure: The extracted text then moves to Structure, here it is cleaned, organized, and converted into a structured format such as sections, metadata or JSON recrnds. The structured data is passed to next stage.</text:span></text:p>
      <text:p text:style-name="P1"><text:span text:style-name="T3">Store: In store stage, data is saved in a database or object storage for reliable access and future processing. </text:span></text:p>
      <text:p text:style-name="P1"><text:span text:style-name="T3">Summarise: Summarize uses an AI model to generate concise insights and key points from the stored content. </text:span></text:p>
      <text:p text:style-name="P1"><text:span text:style-name="T3">Visualise: Finally, visualise presents the summaries and extracted information through charts, dashboards, or reports, making the document easier to understand and visually attractive.</text:span><text:span text:style-name="T4"/></text:p>
      <text:p text:style-name="P1"><text:span text:style-name="T4"/></text:p>
      <text:p text:style-name="P1"><text:span text:style-name="T4">=== SECTION B — ARCHITECTURE DIAGRAM ===</text:span></text:p>
      <text:p text:style-name="P1"><text:span text:style-name="T4"><text:s/></text:span></text:p>
      <text:p text:style-name="P1"><text:span text:style-name="T4">B1. Write a small text-based diagram (ASCII or arrow-list) showing the</text:span></text:p>
      <text:p text:style-name="P1"><text:span text:style-name="T4"><text:s text:c="4"/>5 stages and what flows between them. Example shape:</text:span></text:p>
      <text:p text:style-name="P1"><text:span text:style-name="T4"><text:s/></text:span></text:p>
      <text:p text:style-name="P1"><text:span text:style-name="T4"><text:s text:c="7"/>PDF -&gt; [Ingest] -&gt; raw text -&gt; [Structure] -&gt; DataFrame -&gt;<text:s/></text:span><text:span text:style-name="T5">[Store]-&gt;text summary-&gt;[Summarise]-&gt;Charts, Bars, Images-&gt;[Visualise]</text:span><text:span text:style-name="T6"/></text:p>
      <text:p text:style-name="P1"><text:span text:style-name="T6"/></text:p>
      <text:p text:style-name="P1"><text:span text:style-name="T6">=== SECTION C — CODE BLOCKS ===</text:span></text:p>
      <text:p text:style-name="P1"><text:span text:style-name="T6"><text:s/></text:span></text:p>
      <text:p text:style-name="P1"><text:span text:style-name="T6">Each block must be in a fenced ```python block.</text:span></text:p>
      <text:p text:style-name="P1"><text:span text:style-name="T6"><text:s/></text:span></text:p>
      <text:p text:style-name="P1"><text:span text:style-name="T6">C1. LOGGING SETUP: logging.basicConfig at INFO level at the top of the</text:span></text:p>
      <text:p text:style-name="P1"><text:span text:style-name="T6"><text:s text:c="4"/>code section.</text:span></text:p>
      <text:p text:style-name="P1"><text:span text:style-name="T6"/></text:p>
      <text:p text:style-name="P1"><text:span text:style-name="T6">import logging </text:span></text:p>
      <text:p text:style-name="P1"><text:span text:style-name="T6">logging.basicConfig(level=logging.INFO)</text:span></text:p>
      <text:p text:style-name="P1"><text:span text:style-name="T6"><text:s/></text:span></text:p>
      <text:p text:style-name="P1"><text:span text:style-name="T6">C2. INGEST + EXTRACT:</text:span></text:p>
      <text:p text:style-name="P1"><text:span text:style-name="T6"><text:s text:c="7"/>- import fitz (PyMuPDF)</text:span></text:p>
      <text:p text:style-name="P1"><text:span text:style-name="T6"><text:s text:c="7"/>- Open ./data/report.pdf</text:span></text:p>
      <text:p text:style-name="P1"><text:span text:style-name="T6"><text:s text:c="7"/>- Loop over all 3 pages</text:span></text:p>
      <text:p text:style-name="P1"><text:span text:style-name="T6"><text:s text:c="7"/>- Collect text per page into a list</text:span></text:p>
      <text:p text:style-name="P1"><text:span text:style-name="T6"/></text:p>
      <text:p text:style-name="P1"><text:span text:style-name="T6">import fitz </text:span></text:p>
      <text:p text:style-name="P1"><text:span text:style-name="T6">doc = fitz.open("/data/report.pdf")</text:span></text:p>
      <text:p text:style-name="P1"><text:span text:style-name="T6">page_list = []</text:span></text:p>
      <text:p text:style-name="P1"><text:span text:style-name="T6">for page in doc :</text:span></text:p>
      <text:p text:style-name="P1"><text:span text:style-name="T6"><text:s text:c="2"/>page_list.append(page.get_text())</text:span></text:p>
      <text:p text:style-name="P1"><text:span text:style-name="T6">print("File is ingested and text extraction is completed successfully.")</text:span></text:p>
      <text:p text:style-name="P1"><text:span text:style-name="T6"><text:s/></text:span></text:p>
      <text:p text:style-name="P1"><text:span text:style-name="T6">C3. STRUCTURE:</text:span></text:p>
      <text:p text:style-name="P1"><text:span text:style-name="T6"><text:s text:c="7"/>- Build a pandas DataFrame with columns:</text:span></text:p>
      <text:p text:style-name="P1"><text:span text:style-name="T6"><text:s text:c="13"/>page_no</text:span></text:p>
      <text:p text:style-name="P1"><text:span text:style-name="T6"><text:s text:c="13"/>word_count</text:span></text:p>
      <text:p text:style-name="P1"><text:span text:style-name="T6"><text:s text:c="13"/>first_50_chars</text:span></text:p>
      <text:p text:style-name="P1"><text:span text:style-name="T6"/></text:p>
      <text:p text:style-name="P1"><text:span text:style-name="T6">import pandas as pd</text:span></text:p>
      <text:p text:style-name="P1"><text:span text:style-name="T6">import numpy as np </text:span></text:p>
      <text:p text:style-name="P1"><text:span text:style-name="T6"/></text:p>
      <text:p text:style-name="P1"><text:span text:style-name="T6">df = pd.DataFrame({</text:span></text:p>
      <text:p text:style-name="P1"><text:span text:style-name="T6"><text:s text:c="4"/>"page_no": range(1, len(page_list)+1),</text:span></text:p>
      <text:p text:style-name="P1"><text:span text:style-name="T6"><text:s text:c="4"/>"word_count": [len(text.split()) for text in page_list],</text:span></text:p>
      <text:p text:style-name="P1"><text:span text:style-name="T6"><text:s text:c="4"/>"first_50": [text[:50] for text in page_list]</text:span></text:p>
      <text:p text:style-name="P1"><text:span text:style-name="T6">})</text:span></text:p>
      <text:p text:style-name="P1"><text:span text:style-name="T6">print(df)</text:span></text:p>
      <text:p text:style-name="P1"><text:span text:style-name="T6">print("File Structured successfully")</text:span></text:p>
      <text:p text:style-name="P1"><text:span text:style-name="T6"><text:s/></text:span></text:p>
      <text:p text:style-name="P1"><text:span text:style-name="T6">C4. STORE:</text:span></text:p>
      <text:p text:style-name="P1"><text:span text:style-name="T6"><text:s text:c="7"/>- os.makedirs("output", exist_ok=True)</text:span></text:p>
      <text:p text:style-name="P1"><text:span text:style-name="T6"><text:s text:c="7"/>- df.to_csv("output/pages.csv", index=False)<text:s text:c="5"/>(overwrite, not append)</text:span></text:p>
      <text:p text:style-name="P1"><text:span text:style-name="T6"><text:s text:c="7"/>- df.to_json("output/pages.json", orient="records")</text:span></text:p>
      <text:p text:style-name="P1"><text:span text:style-name="T6"/></text:p>
      <text:p text:style-name="P1"><text:span text:style-name="T6">import os </text:span></text:p>
      <text:p text:style-name="P1"><text:span text:style-name="T6">os.makedirs("output", exist_ok=True)</text:span></text:p>
      <text:p text:style-name="P1"><text:span text:style-name="T6">df.to_csv(</text:span></text:p>
      <text:p text:style-name="P1"><text:span text:style-name="T6"><text:s text:c="4"/>"output/pages.csv", index=False</text:span></text:p>
      <text:p text:style-name="P1"><text:span text:style-name="T6">)</text:span></text:p>
      <text:p text:style-name="P1"><text:span text:style-name="T6">df.to_json(</text:span></text:p>
      <text:p text:style-name="P1"><text:span text:style-name="T6"><text:s text:c="4"/>"output/pages.json", orient="records"</text:span></text:p>
      <text:p text:style-name="P1"><text:span text:style-name="T6">)</text:span></text:p>
      <text:p text:style-name="P1"><text:span text:style-name="T6">print("File stored successfully")</text:span></text:p>
      <text:p text:style-name="P1"><text:span text:style-name="T6"><text:s/></text:span></text:p>
      <text:p text:style-name="P1"><text:span text:style-name="T6">C5. SUMMARISE WITH GROQ:</text:span></text:p>
      <text:p text:style-name="P1"><text:span text:style-name="T6"><text:s text:c="7"/>- from groq import Groq</text:span></text:p>
      <text:p text:style-name="P1"><text:span text:style-name="T6"><text:s text:c="7"/>- Combine all page text, take the first 2000 characters</text:span></text:p>
      <text:p text:style-name="P1"><text:span text:style-name="T6"><text:s text:c="7"/>- client.chat.completions.create(...) with:</text:span></text:p>
      <text:p text:style-name="P1"><text:span text:style-name="T6"><text:s text:c="12"/>model="llama-3.1-8b-instant"</text:span></text:p>
      <text:p text:style-name="P1"><text:span text:style-name="T6"><text:s text:c="12"/>prompt: "Summarise this in exactly 3 bullet points."</text:span></text:p>
      <text:p text:style-name="P1"><text:span text:style-name="T6"><text:s text:c="7"/>- Print response.choices[0].message.content</text:span></text:p>
      <text:p text:style-name="P1"><text:span text:style-name="T6"/></text:p>
      <text:p text:style-name="P1"><text:span text:style-name="T6">from groq import Groq</text:span></text:p>
      <text:p text:style-name="P1"><text:span text:style-name="T6">import os </text:span></text:p>
      <text:p text:style-name="P1"><text:span text:style-name="T6">from dotenv import load_dotenv</text:span></text:p>
      <text:p text:style-name="P1"><text:span text:style-name="T6">prompt = """</text:span></text:p>
      <text:p text:style-name="P1"><text:span text:style-name="T6">Summarise this in exactly 3 bullet points.</text:span></text:p>
      <text:p text:style-name="P1"><text:span text:style-name="T6">"""</text:span></text:p>
      <text:p text:style-name="P1"><text:span text:style-name="T6">messages = []</text:span></text:p>
      <text:p text:style-name="P1"><text:span text:style-name="T6">messages.append(</text:span></text:p>
      <text:p text:style-name="P1"><text:span text:style-name="T6"><text:s text:c="4"/>{</text:span></text:p>
      <text:p text:style-name="P1"><text:span text:style-name="T6"><text:s text:c="8"/>"role": "user",</text:span></text:p>
      <text:p text:style-name="P1"><text:span text:style-name="T6"><text:s text:c="8"/>"message": prompt </text:span></text:p>
      <text:p text:style-name="P1"><text:span text:style-name="T6"><text:s text:c="4"/>}</text:span></text:p>
      <text:p text:style-name="P1"><text:span text:style-name="T6">)</text:span></text:p>
      <text:p text:style-name="P1"><text:span text:style-name="T6">client = Groq(</text:span></text:p>
      <text:p text:style-name="P1"><text:span text:style-name="T6"><text:s text:c="4"/>api_key = GROQ_API_KEY</text:span></text:p>
      <text:p text:style-name="P1"><text:span text:style-name="T6">)</text:span></text:p>
      <text:p text:style-name="P1"><text:span text:style-name="T6">combined_text = " ".join(page_list)[:2000]</text:span></text:p>
      <text:p text:style-name="P1"><text:span text:style-name="T6">response = client.chat.completions.create(</text:span></text:p>
      <text:p text:style-name="P1"><text:span text:style-name="T6"><text:s text:c="4"/>model = "llama-3.1-8b-instant",</text:span></text:p>
      <text:p text:style-name="P1"><text:span text:style-name="T6"><text:s text:c="4"/>messages = messages </text:span></text:p>
      <text:p text:style-name="P1"><text:span text:style-name="T6">)</text:span></text:p>
      <text:p text:style-name="P1"><text:span text:style-name="T6">print(response.choices[0].message.content)</text:span></text:p>
      <text:p text:style-name="P1"><text:span text:style-name="T6">print("File Summarized successfully")</text:span></text:p>
      <text:p text:style-name="P1"><text:span text:style-name="T6"><text:s/></text:span></text:p>
      <text:p text:style-name="P1"><text:span text:style-name="T6">C6. VISUALISE:</text:span></text:p>
      <text:p text:style-name="P1"><text:span text:style-name="T6"><text:s text:c="7"/>- matplotlib bar chart of word_count per page</text:span></text:p>
      <text:p text:style-name="P1"><text:span text:style-name="T6"><text:s text:c="7"/>- Must have plt.title(), plt.xlabel(), plt.ylabel()</text:span></text:p>
      <text:p text:style-name="P1"><text:span text:style-name="T6"/></text:p>
      <text:p text:style-name="P1"><text:span text:style-name="T6">import matplotlib.pyplot as plt</text:span></text:p>
      <text:p text:style-name="P1"><text:span text:style-name="T6">fig, ax = plt.subplots(figsize=(6,4))</text:span></text:p>
      <text:p text:style-name="P1"><text:span text:style-name="T6">bars = plt.bar(df["page_no"], df["word_count"])</text:span></text:p>
      <text:p text:style-name="P1"><text:span text:style-name="T6">for bar, val in zip(bars, df["word_count"]):</text:span></text:p>
      <text:p text:style-name="P1"><text:span text:style-name="T6"><text:s text:c="2"/>ax.text(bar.get_x()+bar.get_width()/2, bar.get_height() + 0.01, f"{val}", ha='center', va='bottom', fontsize = 11, fontweight = 'bold')</text:span></text:p>
      <text:p text:style-name="P1"><text:span text:style-name="T6">ax.title("SYNTHESIS SPRINT")</text:span></text:p>
      <text:p text:style-name="P1"><text:span text:style-name="T6">ax.xlabel("Page Number")</text:span></text:p>
      <text:p text:style-name="P1"><text:span text:style-name="T6">ax.ylabel("Word Count")</text:span></text:p>
      <text:p text:style-name="P1"><text:span text:style-name="T6">plt.show()</text:span></text:p>
      <text:p text:style-name="P1"><text:span text:style-name="T6"/></text:p>
      <text:p text:style-name="P1"><text:span text:style-name="T6">=== SECTION D — EXPECTED GROQ RESPONSE SHAPE ===</text:span></text:p>
      <text:p text:style-name="P1"><text:span text:style-name="T6"><text:s/></text:span></text:p>
      <text:p text:style-name="P1"><text:span text:style-name="T6">D1. Write 3-5 lines of plain text describing what the Groq call would</text:span></text:p>
      <text:p text:style-name="P1"><text:span text:style-name="T6"><text:s text:c="4"/>print — i.e., what the response should look like. Mention that it</text:span></text:p>
      <text:p text:style-name="P1"><text:span text:style-name="T6"><text:s text:c="4"/>will be 3 bullet points and what the bullets are likely to cover.</text:span></text:p>
      <text:p text:style-name="P1"><text:span text:style-name="T6"><text:s/></text:span></text:p>
      <text:p text:style-name="P1"><text:span text:style-name="T7">The Groq API call is expected to return a summary of the PDF content in exactly three bullet points. Each bullet point should highlight a key topic, finding from the document. The summary should be easy to read and capture major points from the PDF. It should not consist unnecessary or repeated details. The bullets will likely cover the document's main points, purpose, observations and conclusions or recommodations.<text:s/></text:span><text:span text:style-name="T8"/></text:p>
      <text:p text:style-name="P1"><text:span text:style-name="T8"><text:s/></text:span></text:p>
      <text:p text:style-name="P1"><text:span text:style-name="T8">=== SECTION E — LESSONS LEARNED ===</text:span></text:p>
      <text:p text:style-name="P1"><text:span text:style-name="T8"><text:s/></text:span></text:p>
      <text:p text:style-name="P1"><text:span text:style-name="T8">E1. Write 80-150 words covering all three of:</text:span></text:p>
      <text:p text:style-name="P1"><text:span text:style-name="T8"><text:s text:c="7"/>- What worked</text:span></text:p>
      <text:p text:style-name="P1"><text:span text:style-name="T8"><text:s text:c="7"/>- What was painful</text:span></text:p>
      <text:p text:style-name="P1"><text:span text:style-name="T8"><text:s text:c="7"/>- One MLOps practice from Day 6 you would add in production</text:span></text:p>
      <text:p text:style-name="P1"><text:span text:style-name="T8"/></text:p>
      <text:p text:style-name="P1"><text:span text:style-name="T9">This assignment demonstrated how a complete document-processing pipeline can be built using Python, data engineering concepts for structuring, and generative AI. The PDF ingestion and text extraction process worked well, and transforming the extracted content into structured DataFrame made it analyze and perform operations. Storing the data into CSV and JSON provided reusable outputs. One challange was ensuring the extracted text was formatted correctly before summarization. Integrating Groq API and managing API keys also required careful configuration as even a slight mistake of uploading API key would trigger mails to admin and lock the key.<text:s/></text:span><text:span text:style-name="T10">One MLOps practice from Day 6<text:s/></text:span><text:span text:style-name="T11">I</text:span><text:span text:style-name="T12"><text:s/>would add in production</text:span><text:span text:style-name="T13"><text:s/>is tracking and monitoring to capture pipeline runs, track model outputs, and improve response and output of the workflow.</text:span><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